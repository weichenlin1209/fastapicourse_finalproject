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180000060040F39745.png" manifest:media-type="image/png"/>
  <manifest:file-entry manifest:full-path="Pictures/100000010000081800000600DD24F4F9.png" manifest:media-type="image/png"/>
  <manifest:file-entry manifest:full-path="Pictures/100000010000038D000002265308AC27.png" manifest:media-type="image/png"/>
  <manifest:file-entry manifest:full-path="Pictures/100000010000081800000600BB45C44D.png" manifest:media-type="image/png"/>
  <manifest:file-entry manifest:full-path="Pictures/10003F2800006BBA000041263A34D6F6.svg" manifest:media-type="image/svg+xml"/>
  <manifest:file-entry manifest:full-path="Pictures/10000001000001B40000014DB0CFA35F.png" manifest:media-type="image/png"/>
  <manifest:file-entry manifest:full-path="Pictures/10000001000001B40000014DC9A036C5.png" manifest:media-type="image/png"/>
  <manifest:file-entry manifest:full-path="Pictures/10000001000002C500000264C60CB905.png" manifest:media-type="image/png"/>
  <manifest:file-entry manifest:full-path="Pictures/10001AC90000495000003F4176FB780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1.9576in"/>
    </style:style>
    <style:style style:name="Table1.B" style:family="table-column">
      <style:table-column-properties style:column-width="4.542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8" style:family="table" style:master-page-name="">
      <style:table-properties style:width="6.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8174in"/>
    </style:style>
    <style:style style:name="Table8.B" style:family="table-column">
      <style:table-column-properties style:column-width="4.6826in"/>
    </style:style>
    <style:style style:name="Table8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B2" style:family="table-cell">
      <style:table-cell-properties style:vertical-align="middle" fo:background-color="transparent" fo:padding-left="0.125in" fo:padding-right="0.125in" fo:padding-top="0.0833in" fo:padding-bottom="0.0833in" fo:border="0.05pt solid #c4c7c5" style:writing-mode="page">
        <style:background-image/>
      </style:table-cell-properties>
    </style:style>
    <style:style style:name="Table8.A3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8.B3" style:family="table-cell">
      <style:table-cell-properties style:vertical-align="middle" fo:background-color="transparent" fo:padding-left="0.125in" fo:padding-right="0.125in" fo:padding-top="0.0833in" fo:padding-bottom="0.0833in" fo:border-left="none" fo:border-right="0.05pt solid #c4c7c5" fo:border-top="none" fo:border-bottom="0.05pt solid #c4c7c5" style:writing-mode="page">
        <style:background-image/>
      </style:table-cell-properties>
    </style:style>
    <style:style style:name="Table8.A4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8.A5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8.B6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0.05pt solid #c4c7c5" fo:border-top="none" fo:border-bottom="0.05pt solid #c4c7c5" style:writing-mode="page">
        <style:background-image/>
      </style:table-cell-properties>
    </style:style>
    <style:style style:name="Table12" style:family="table" style:master-page-name="">
      <style:table-properties style:width="6.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1.9278in"/>
    </style:style>
    <style:style style:name="Table12.B" style:family="table-column">
      <style:table-column-properties style:column-width="4.5722in"/>
    </style:style>
    <style:style style:name="Table1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B2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0.05pt solid #c4c7c5" fo:border-top="none" fo:border-bottom="0.05pt solid #c4c7c5" style:writing-mode="page">
        <style:background-image/>
      </style:table-cell-properties>
    </style:style>
    <style:style style:name="Table12.A3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2.B3" style:family="table-cell">
      <style:table-cell-properties style:vertical-align="middle" fo:background-color="transparent" fo:padding-left="0.125in" fo:padding-right="0.125in" fo:padding-top="0.0833in" fo:padding-bottom="0.0833in" fo:border-left="none" fo:border-right="0.05pt solid #c4c7c5" fo:border-top="none" fo:border-bottom="0.05pt solid #c4c7c5" style:writing-mode="page">
        <style:background-image/>
      </style:table-cell-properties>
    </style:style>
    <style:style style:name="Table12.A4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2.A5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2.A6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3" style:family="table" style:master-page-name="">
      <style:table-properties style:width="6.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1.9278in"/>
    </style:style>
    <style:style style:name="Table13.B" style:family="table-column">
      <style:table-column-properties style:column-width="4.5722in"/>
    </style:style>
    <style:style style:name="Table13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13.2" style:family="table-row">
      <style:table-row-properties fo:background-color="transparent" fo:keep-together="auto">
        <style:background-image/>
      </style:table-row-properties>
    </style:style>
    <style:style style:name="Table13.B2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0.05pt solid #c4c7c5" fo:border-top="none" fo:border-bottom="0.05pt solid #c4c7c5" style:writing-mode="page">
        <style:background-image/>
      </style:table-cell-properties>
    </style:style>
    <style:style style:name="Table13.A3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3.B3" style:family="table-cell">
      <style:table-cell-properties style:vertical-align="middle" fo:background-color="transparent" fo:padding-left="0.125in" fo:padding-right="0.125in" fo:padding-top="0.0833in" fo:padding-bottom="0.0833in" fo:border-left="none" fo:border-right="0.05pt solid #c4c7c5" fo:border-top="none" fo:border-bottom="0.05pt solid #c4c7c5" style:writing-mode="page">
        <style:background-image/>
      </style:table-cell-properties>
    </style:style>
    <style:style style:name="Table13.A4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3.A5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13.A6" style:family="table-cell">
      <style:table-cell-properties style:vertical-align="middle" fo:padding-left="0.125in" fo:padding-right="0.125in" fo:padding-top="0.0833in" fo:padding-bottom="0.0833in" fo:border-left="0.05pt solid #c4c7c5" fo:border-right="none" fo:border-top="none" fo:border-bottom="0.05pt solid #c4c7c5"/>
    </style:style>
    <style:style style:name="Table9" style:family="table">
      <style:table-properties style:width="6.5in" table:align="left"/>
    </style:style>
    <style:style style:name="Table9.A" style:family="table-column">
      <style:table-column-properties style:column-width="1.8799in"/>
    </style:style>
    <style:style style:name="Table9.B" style:family="table-column">
      <style:table-column-properties style:column-width="4.6201in"/>
    </style:style>
    <style:style style:name="Table9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10" style:family="table">
      <style:table-properties style:width="6.5in" table:align="left"/>
    </style:style>
    <style:style style:name="Table10.A" style:family="table-column">
      <style:table-column-properties style:column-width="2.1056in"/>
    </style:style>
    <style:style style:name="Table10.B" style:family="table-column">
      <style:table-column-properties style:column-width="4.3944in"/>
    </style:style>
    <style:style style:name="Table10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11" style:family="table" style:master-page-name="">
      <style:table-properties style:width="6.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0063in"/>
    </style:style>
    <style:style style:name="Table11.B" style:family="table-column">
      <style:table-column-properties style:column-width="4.4938in"/>
    </style:style>
    <style:style style:name="Table1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B2" style:family="table-cell">
      <style:table-cell-properties style:vertical-align="middle" fo:background-color="transparent" fo:padding-left="0.125in" fo:padding-right="0.125in" fo:padding-top="0.0833in" fo:padding-bottom="0.0833in" fo:border="0.05pt solid #c4c7c5" style:writing-mode="page">
        <style:background-image/>
      </style:table-cell-properties>
    </style:style>
    <style:style style:name="Table11.B3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0.05pt solid #c4c7c5" fo:border-top="none" fo:border-bottom="0.05pt solid #c4c7c5" style:writing-mode="page">
        <style:background-image/>
      </style:table-cell-properties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625in" style:rel-column-width="16383*"/>
    </style:style>
    <style:style style:name="Table2.D" style:family="table-column">
      <style:table-column-properties style:column-width="1.625in" style:rel-column-width="16386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1.625in" style:rel-column-width="16383*"/>
    </style:style>
    <style:style style:name="Table3.D" style:family="table-column">
      <style:table-column-properties style:column-width="1.625in" style:rel-column-width="16386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1.625in" style:rel-column-width="16383*"/>
    </style:style>
    <style:style style:name="Table4.D" style:family="table-column">
      <style:table-column-properties style:column-width="1.625in" style:rel-column-width="16386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5in" style:rel-width="100%" table:align="center"/>
    </style:style>
    <style:style style:name="Table5.A" style:family="table-column">
      <style:table-column-properties style:column-width="1.625in" style:rel-column-width="16383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1.625in" style:rel-column-width="16383*"/>
    </style:style>
    <style:style style:name="Table6.D" style:family="table-column">
      <style:table-column-properties style:column-width="1.625in" style:rel-column-width="16386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5in" style:rel-width="100%" table:align="center"/>
    </style:style>
    <style:style style:name="Table7.A" style:family="table-column">
      <style:table-column-properties style:column-width="2.1667in" style:rel-column-width="21845*"/>
    </style:style>
    <style:style style:name="Table7.A1" style:family="table-cell">
      <style:table-cell-properties fo:padding="0in" fo:border="none"/>
    </style:style>
    <style:style style:name="Table14" style:family="table" style:master-page-name="">
      <style:table-properties style:width="6.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1.8521in" style:rel-column-width="2667*"/>
    </style:style>
    <style:style style:name="Table14.B" style:family="table-column">
      <style:table-column-properties style:column-width="4.6479in" style:rel-column-width="6693*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none" fo:border-top="0.05pt solid #c4c7c5" fo:border-bottom="0.05pt solid #c4c7c5" style:writing-mode="page">
        <style:background-image/>
      </style:table-cell-properties>
    </style:style>
    <style:style style:name="Table14.B1" style:family="table-cell">
      <style:table-cell-properties style:vertical-align="middle" fo:background-color="transparent" fo:padding-left="0.125in" fo:padding-right="0.125in" fo:padding-top="0.0833in" fo:padding-bottom="0.0833in" fo:border-left="none" fo:border-right="0.05pt solid #c4c7c5" fo:border-top="0.05pt solid #c4c7c5" fo:border-bottom="0.05pt solid #c4c7c5" style:writing-mode="page">
        <style:background-image/>
      </style:table-cell-properties>
    </style:style>
    <style:style style:name="Table14.A2" style:family="table-cell">
      <style:table-cell-properties style:vertical-align="middle" fo:background-color="transparent" fo:padding-left="0.125in" fo:padding-right="0.125in" fo:padding-top="0.0833in" fo:padding-bottom="0.0833in" fo:border-left="0.05pt solid #c4c7c5" fo:border-right="none" fo:border-top="none" fo:border-bottom="0.05pt solid #c4c7c5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-left="0.125in" fo:padding-right="0.125in" fo:padding-top="0.0833in" fo:padding-bottom="0.0833in" fo:border-left="none" fo:border-right="0.05pt solid #c4c7c5" fo:border-top="none" fo:border-bottom="0.05pt solid #c4c7c5" style:writing-mode="page">
        <style:background-image/>
      </style:table-cell-properties>
    </style:style>
    <style:style style:name="P1" style:family="paragraph" style:parent-style-name="Title">
      <style:text-properties officeooo:paragraph-rsid="0002ea8c"/>
    </style:style>
    <style:style style:name="P2" style:family="paragraph" style:parent-style-name="Author">
      <style:text-properties officeooo:paragraph-rsid="000eb389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First_20_paragraph">
      <style:text-properties officeooo:paragraph-rsid="00120f97"/>
    </style:style>
    <style:style style:name="P5" style:family="paragraph" style:parent-style-name="Text_20_body">
      <style:text-properties officeooo:paragraph-rsid="0002ea8c"/>
    </style:style>
    <style:style style:name="P6" style:family="paragraph" style:parent-style-name="Text_20_body" style:list-style-name="L1">
      <style:text-properties officeooo:paragraph-rsid="0002ea8c"/>
    </style:style>
    <style:style style:name="P7" style:family="paragraph" style:parent-style-name="Text_20_body" style:list-style-name="L2">
      <style:text-properties officeooo:paragraph-rsid="0002ea8c"/>
    </style:style>
    <style:style style:name="P8" style:family="paragraph" style:parent-style-name="Text_20_body">
      <style:text-properties fo:font-size="14pt" fo:font-weight="bold" officeooo:rsid="0002ea8c" officeooo:paragraph-rsid="0002ea8c" style:font-size-asian="14pt" style:language-asian="zh" style:country-asian="TW" style:font-weight-asian="bold" style:font-size-complex="14pt" style:font-weight-complex="bold"/>
    </style:style>
    <style:style style:name="P9" style:family="paragraph" style:parent-style-name="Heading_20_3">
      <style:text-properties officeooo:paragraph-rsid="0002ea8c"/>
    </style:style>
    <style:style style:name="P10" style:family="paragraph" style:parent-style-name="Heading_20_3">
      <style:text-properties fo:font-size="12pt" fo:font-weight="bold" officeooo:rsid="0002ea8c" officeooo:paragraph-rsid="0002ea8c" style:font-size-asian="12pt" style:language-asian="zh" style:country-asian="TW" style:font-weight-asian="bold" style:font-size-complex="12pt" style:font-weight-complex="bold"/>
    </style:style>
    <style:style style:name="P11" style:family="paragraph" style:parent-style-name="Text_20_body">
      <style:text-properties fo:font-size="12pt" fo:font-weight="normal" officeooo:rsid="0002ea8c" officeooo:paragraph-rsid="0002ea8c" style:font-size-asian="12pt" style:language-asian="zh" style:country-asian="TW" style:font-weight-asian="normal" style:font-size-complex="12pt" style:font-weight-complex="normal"/>
    </style:style>
    <style:style style:name="P12" style:family="paragraph" style:parent-style-name="Heading_20_3">
      <style:paragraph-properties fo:margin-top="0.1665in" fo:margin-bottom="0.0835in" style:contextual-spacing="false" fo:keep-with-next="always"/>
      <style:text-properties style:font-name="Arial" fo:font-size="12pt" officeooo:rsid="0002ea8c" officeooo:paragraph-rsid="0002ea8c" style:font-name-asian="Lucida Sans Unicode" style:font-size-asian="12pt" style:language-asian="zh" style:country-asian="TW" style:font-name-complex="Tahoma1" style:font-size-complex="12pt"/>
    </style:style>
    <style:style style:name="P13" style:family="paragraph" style:parent-style-name="Text_20_body">
      <style:text-properties fo:font-weight="normal" officeooo:rsid="0002ea8c" officeooo:paragraph-rsid="0002ea8c" style:language-asian="zh" style:country-asian="TW" style:font-weight-asian="normal" style:font-weight-complex="normal"/>
    </style:style>
    <style:style style:name="P14" style:family="paragraph" style:parent-style-name="Text_20_body">
      <style:text-properties fo:font-weight="normal" officeooo:rsid="0002ea8c" style:language-asian="zh" style:country-asian="TW" style:font-weight-asian="normal" style:font-weight-complex="normal"/>
    </style:style>
    <style:style style:name="P15" style:family="paragraph" style:parent-style-name="Text_20_body">
      <style:text-properties fo:font-weight="bold" officeooo:rsid="0002ea8c" style:language-asian="zh" style:country-asian="TW" style:font-weight-asian="bold" style:font-weight-complex="bold"/>
    </style:style>
    <style:style style:name="P16" style:family="paragraph" style:parent-style-name="Heading_20_3">
      <style:text-properties officeooo:paragraph-rsid="0003e576"/>
    </style:style>
    <style:style style:name="P17" style:family="paragraph" style:parent-style-name="Text_20_body">
      <style:text-properties fo:font-weight="bold" officeooo:paragraph-rsid="0003e576" style:font-weight-asian="bold" style:font-weight-complex="bold"/>
    </style:style>
    <style:style style:name="P18" style:family="paragraph" style:parent-style-name="Text_20_body">
      <style:text-properties officeooo:paragraph-rsid="00045611"/>
    </style:style>
    <style:style style:name="P19" style:family="paragraph" style:parent-style-name="Text_20_body">
      <style:text-properties fo:font-weight="bold" officeooo:paragraph-rsid="00045611" style:font-weight-asian="bold" style:font-weight-complex="bold"/>
    </style:style>
    <style:style style:name="P20" style:family="paragraph" style:parent-style-name="Text_20_body">
      <style:text-properties officeooo:paragraph-rsid="0005d08d"/>
    </style:style>
    <style:style style:name="P21" style:family="paragraph" style:parent-style-name="Text_20_body">
      <style:text-properties style:font-name="Arial" fo:font-size="14pt" fo:font-weight="bold" officeooo:paragraph-rsid="0005d08d" style:font-name-asian="Lucida Sans Unicode" style:font-size-asian="14pt" style:font-weight-asian="bold" style:font-name-complex="Tahoma1" style:font-size-complex="14pt" style:font-weight-complex="bold"/>
    </style:style>
    <style:style style:name="P22" style:family="paragraph" style:parent-style-name="Text_20_body">
      <style:text-properties style:font-name="Arial" fo:font-weight="bold" officeooo:paragraph-rsid="0005d08d" style:font-name-asian="Lucida Sans Unicode" style:font-weight-asian="bold" style:font-name-complex="Tahoma1" style:font-weight-complex="bold"/>
    </style:style>
    <style:style style:name="P23" style:family="paragraph" style:parent-style-name="Text_20_body">
      <style:paragraph-properties fo:margin-top="0.1665in" fo:margin-bottom="0.0835in" style:contextual-spacing="false"/>
      <style:text-properties officeooo:paragraph-rsid="0003e576"/>
    </style:style>
    <style:style style:name="P24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Arial" fo:font-size="14pt" fo:font-weight="bold" officeooo:paragraph-rsid="0005d08d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27" style:family="paragraph" style:parent-style-name="Text_20_body">
      <style:text-properties style:font-name="Arial" fo:font-size="12pt" fo:font-weight="bold" officeooo:paragraph-rsid="000770a5" style:font-name-asian="Lucida Sans Unicode" style:font-size-asian="12pt" style:language-asian="zh" style:country-asian="TW" style:font-weight-asian="bold" style:font-name-complex="Tahoma1" style:font-size-complex="12pt" style:font-weight-complex="bold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29" style:family="paragraph" style:parent-style-name="Table_20_Contents">
      <style:paragraph-properties fo:margin-left="0in" fo:margin-right="0in" fo:margin-top="0in" fo:margin-bottom="0.0598in" style:contextual-spacing="false" fo:line-height="114%" fo:text-indent="0in" style:auto-text-indent="false"/>
      <style:text-properties style:font-name-asian="Google Sans Text" style:font-weight-asian="bold"/>
    </style:style>
    <style:style style:name="P30" style:family="paragraph" style:parent-style-name="Table_20_Contents">
      <style:paragraph-properties fo:margin-left="0in" fo:margin-right="0in" fo:margin-top="0in" fo:margin-bottom="0.0598in" style:contextual-spacing="false" fo:line-height="114%"/>
      <style:text-properties officeooo:paragraph-rsid="00094f4b"/>
    </style:style>
    <style:style style:name="P31" style:family="paragraph" style:parent-style-name="Table_20_Contents">
      <style:paragraph-properties fo:margin-left="0in" fo:margin-right="0in" fo:margin-top="0in" fo:margin-bottom="0.0598in" style:contextual-spacing="false" fo:line-height="114%"/>
    </style:style>
    <style:style style:name="P32" style:family="paragraph" style:parent-style-name="Table_20_Contents">
      <style:paragraph-properties fo:margin-left="0in" fo:margin-right="0in" fo:margin-top="0in" fo:margin-bottom="0.0598in" style:contextual-spacing="false" fo:line-height="114%" fo:text-indent="0in" style:auto-text-indent="false"/>
    </style:style>
    <style:style style:name="P33" style:family="paragraph" style:parent-style-name="Text_20_body">
      <style:text-properties style:font-name="Arial" fo:font-size="12pt" fo:font-weight="bold" officeooo:rsid="00094f4b" officeooo:paragraph-rsid="00094f4b" style:font-name-asian="Lucida Sans Unicode" style:font-size-asian="12pt" style:language-asian="zh" style:country-asian="TW" style:font-weight-asian="bold" style:font-name-complex="Tahoma1" style:font-size-complex="12pt" style:font-weight-complex="bold"/>
    </style:style>
    <style:style style:name="P34" style:family="paragraph" style:parent-style-name="Text_20_body">
      <style:text-properties style:font-name="Arial" fo:font-size="12pt" fo:font-weight="bold" officeooo:rsid="0007acfa" officeooo:paragraph-rsid="0007acfa" style:font-name-asian="Lucida Sans Unicode" style:font-size-asian="12pt" style:language-asian="zh" style:country-asian="TW" style:font-weight-asian="bold" style:font-name-complex="Tahoma1" style:font-size-complex="12pt" style:font-weight-complex="bold"/>
    </style:style>
    <style:style style:name="P35" style:family="paragraph" style:parent-style-name="Text_20_body">
      <style:text-properties style:font-name="Arial" fo:font-size="12pt" fo:font-weight="bold" officeooo:paragraph-rsid="0007acfa" style:font-name-asian="Lucida Sans Unicode" style:font-size-asian="12pt" style:language-asian="zh" style:country-asian="TW" style:font-weight-asian="bold" style:font-name-complex="Tahoma1" style:font-size-complex="12pt" style:font-weight-complex="bold"/>
    </style:style>
    <style:style style:name="P36" style:family="paragraph" style:parent-style-name="Text_20_body">
      <style:text-properties style:font-name="Arial" fo:font-size="12pt" fo:font-weight="bold" officeooo:rsid="0007acfa" officeooo:paragraph-rsid="00094f4b" style:font-name-asian="Lucida Sans Unicode" style:font-size-asian="12pt" style:language-asian="zh" style:country-asian="TW" style:font-weight-asian="bold" style:font-name-complex="Tahoma1" style:font-size-complex="12pt" style:font-weight-complex="bold"/>
    </style:style>
    <style:style style:name="P37" style:family="paragraph" style:parent-style-name="Heading_20_2" style:list-style-name="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Heading_20_2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First_20_paragraph">
      <style:text-properties fo:font-weight="bold" style:font-weight-asian="bold" style:font-weight-complex="bold"/>
    </style:style>
    <style:style style:name="P41" style:family="paragraph" style:parent-style-name="First_20_paragraph">
      <style:text-properties officeooo:paragraph-rsid="000ad617"/>
    </style:style>
    <style:style style:name="P42" style:family="paragraph" style:parent-style-name="Text_20_body">
      <style:text-properties officeooo:paragraph-rsid="000ad617" style:language-asian="zh" style:country-asian="TW"/>
    </style:style>
    <style:style style:name="P43" style:family="paragraph" style:parent-style-name="First_20_paragraph">
      <style:text-properties fo:font-weight="bold" officeooo:rsid="000ad617" officeooo:paragraph-rsid="000ad617" style:font-weight-asian="bold" style:font-weight-complex="bold"/>
    </style:style>
    <style:style style:name="P44" style:family="paragraph" style:parent-style-name="Heading_20_3">
      <style:paragraph-properties fo:margin-top="0.1665in" fo:margin-bottom="0.0835in" style:contextual-spacing="false" fo:keep-with-next="always"/>
      <style:text-properties style:font-name="Arial" style:font-name-asian="Lucida Sans Unicode" style:font-name-complex="Tahoma1"/>
    </style:style>
    <style:style style:name="P45" style:family="paragraph" style:parent-style-name="Text_20_body">
      <style:paragraph-properties fo:margin-top="0.1665in" fo:margin-bottom="0.0835in" style:contextual-spacing="false"/>
      <style:text-properties style:font-name="Arial" fo:font-weight="normal" officeooo:rsid="000eb389" officeooo:paragraph-rsid="000eb389" style:font-name-asian="Lucida Sans Unicode" style:language-asian="zh" style:country-asian="TW" style:font-weight-asian="normal" style:font-name-complex="Tahoma1" style:font-weight-complex="normal"/>
    </style:style>
    <style:style style:name="P46" style:family="paragraph" style:parent-style-name="Text_20_body">
      <style:paragraph-properties fo:margin-top="0.1665in" fo:margin-bottom="0.0835in" style:contextual-spacing="false"/>
      <style:text-properties style:font-name="Arial" fo:font-weight="normal" officeooo:rsid="000eb389" officeooo:paragraph-rsid="0010e67e" style:font-name-asian="Lucida Sans Unicode" style:language-asian="zh" style:country-asian="TW" style:font-weight-asian="normal" style:font-name-complex="Tahoma1" style:font-weight-complex="normal"/>
    </style:style>
    <style:style style:name="P47" style:family="paragraph" style:parent-style-name="Text_20_body">
      <style:paragraph-properties fo:margin-top="0.1665in" fo:margin-bottom="0.0835in" style:contextual-spacing="false"/>
      <style:text-properties style:font-name="Arial" fo:font-size="14pt" fo:font-weight="bold" officeooo:rsid="000ecdbc" officeooo:paragraph-rsid="000eb389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48" style:family="paragraph" style:parent-style-name="Text_20_body">
      <style:paragraph-properties fo:margin-top="0.1665in" fo:margin-bottom="0.0835in" style:contextual-spacing="false" fo:break-before="page"/>
      <style:text-properties style:font-name="Arial" fo:font-size="14pt" fo:font-weight="bold" officeooo:rsid="000ecdbc" officeooo:paragraph-rsid="000ecdbc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49" style:family="paragraph" style:parent-style-name="Text_20_body">
      <style:paragraph-properties fo:margin-top="0.1665in" fo:margin-bottom="0.0835in" style:contextual-spacing="false"/>
      <style:text-properties style:font-name="Arial" fo:font-size="14pt" fo:font-weight="bold" officeooo:rsid="000f39c7" officeooo:paragraph-rsid="000f39c7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50" style:family="paragraph" style:parent-style-name="Text_20_body">
      <style:paragraph-properties fo:margin-top="0.1665in" fo:margin-bottom="0.0835in" style:contextual-spacing="false"/>
      <style:text-properties style:font-name="Arial" fo:font-size="14pt" fo:font-weight="bold" officeooo:rsid="000f39c7" officeooo:paragraph-rsid="000ecdbc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51" style:family="paragraph" style:parent-style-name="Text_20_body">
      <style:paragraph-properties fo:margin-top="0.1665in" fo:margin-bottom="0.0835in" style:contextual-spacing="false"/>
      <style:text-properties style:font-name="Arial" fo:font-size="14pt" fo:font-weight="bold" officeooo:rsid="000f39c7" officeooo:paragraph-rsid="0011e509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52" style:family="paragraph" style:parent-style-name="Text_20_body">
      <style:paragraph-properties fo:margin-top="0.1665in" fo:margin-bottom="0.0835in" style:contextual-spacing="false"/>
      <style:text-properties style:font-name="Arial" fo:font-size="14pt" fo:font-weight="bold" officeooo:rsid="0011e509" officeooo:paragraph-rsid="0011e509" style:font-name-asian="Lucida Sans Unicode" style:font-size-asian="14pt" style:language-asian="zh" style:country-asian="TW" style:font-weight-asian="bold" style:font-name-complex="Tahoma1" style:font-size-complex="14pt" style:font-weight-complex="bold"/>
    </style:style>
    <style:style style:name="P53" style:family="paragraph" style:parent-style-name="Table_20_Contents">
      <style:paragraph-properties fo:margin-left="0in" fo:margin-right="0in" fo:margin-top="0in" fo:margin-bottom="0.0598in" style:contextual-spacing="false" fo:line-height="114%"/>
      <style:text-properties fo:font-weight="bold" style:font-weight-asian="bold" style:font-weight-complex="bold"/>
    </style:style>
    <style:style style:name="T1" style:family="text">
      <style:text-properties style:language-asian="zh" style:country-asian="T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officeooo:rsid="0003e576"/>
    </style:style>
    <style:style style:name="T5" style:family="text">
      <style:text-properties fo:font-weight="normal" officeooo:rsid="0002ea8c" style:language-asian="zh" style:country-asian="TW" style:font-weight-asian="normal" style:font-weight-complex="normal"/>
    </style:style>
    <style:style style:name="T6" style:family="text">
      <style:text-properties officeooo:rsid="0003e576" style:language-asian="zh" style:country-asian="TW"/>
    </style:style>
    <style:style style:name="T7" style:family="text">
      <style:text-properties officeooo:rsid="000770a5"/>
    </style:style>
    <style:style style:name="T8" style:family="text">
      <style:text-properties style:font-name-asian="Google Sans Text"/>
    </style:style>
    <style:style style:name="T9" style:family="text">
      <style:text-properties officeooo:rsid="00094f4b"/>
    </style:style>
    <style:style style:name="T10" style:family="text">
      <style:text-properties officeooo:rsid="00094f4b" style:language-asian="zh" style:country-asian="TW"/>
    </style:style>
    <style:style style:name="T11" style:family="text">
      <style:text-properties style:font-name-asian="Google Sans Text" style:font-weight-asian="bold"/>
    </style:style>
    <style:style style:name="T12" style:family="text">
      <style:text-properties style:font-name="Google Sans Text" fo:font-weight="bold"/>
    </style:style>
    <style:style style:name="T13" style:family="text">
      <style:text-properties style:font-name="Google Sans Text"/>
    </style:style>
    <style:style style:name="T14" style:family="text">
      <style:text-properties officeooo:rsid="000eb389"/>
    </style:style>
    <style:style style:name="T15" style:family="text">
      <style:text-properties officeooo:rsid="000bc1d6" style:language-asian="zh" style:country-asian="TW"/>
    </style:style>
    <style:style style:name="T16" style:family="text">
      <style:text-properties fo:font-weight="bold" officeooo:rsid="000ad617" style:font-weight-asian="bold" style:font-weight-complex="bold"/>
    </style:style>
    <style:style style:name="T17" style:family="text">
      <style:text-properties officeooo:rsid="0010e6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網際網路系統設計 </text:p>
      <text:p text:style-name="P1">期末專案系統需求規格書</text:p>
      <text:p text:style-name="P2">4113053103 林貞伶 4113053104 林煒宸</text:p>
      <text:p text:style-name="Date"/>
      <text:h text:style-name="P3" text:outline-level="2"><text:bookmark-start text:name="一專案概述與問題定義"/>一、專案概述與問題定義<text:bookmark-end text:name="一專案概述與問題定義"/></text:h>
      <text:p text:style-name="P4">音樂性社團在日常運營中面臨諸多行政挑戰，包括社員資料管理、社團公告發布、練團室時段預約、以及<text:span text:style-name="T1">決定表演歌曲</text:span>等繁雜事務。目前多數社團仍依賴社群媒體或即時通訊軟體進行溝通與協調，缺乏一套統一的數位管理平台，導致資訊分散、溝通成本高、行政效率低落等問題。此外，擁有專屬官方網站不僅能有效整合社團資訊，<text:span text:style-name="T1">讓資訊更透明，</text:span>提升社團的專業形象與辨識度。為解決上述問題，本專案開發一套音樂社團管理系統，提供社員與幹部一個集中化的線上平台，以簡化行政流程、促進社團內部協作，並建立社團的專屬網路形象。</text:p>
      <text:h text:style-name="P3" text:outline-level="2"><text:bookmark-start text:name="二使用者分析與需求"/>二、使用者分析與需求<text:bookmark-end text:name="二使用者分析與需求"/></text:h>
      <text:h text:style-name="Heading_20_3" text:outline-level="3"><text:bookmark-start text:name="需求分析"/>2.1 需求分析<text:bookmark-end text:name="需求分析"/></text:h>
      <text:p text:style-name="First_20_paragraph">本系統的使用者可分為兩類：一般社員（Member）與社團幹部（Officer），其需求分別說明如下。</text:p>
      <text:p text:style-name="Text_20_body"/>
      <text:p text:style-name="P5"><text:span text:style-name="T2">一般社員需求：</text:span></text:p>
      <text:list text:style-name="L1">
        <text:list-item>
          <text:p text:style-name="P6">瀏覽社團公告，即時掌握社團最新消息</text:p>
        </text:list-item>
        <text:list-item>
          <text:p text:style-name="P6">提議欲練習的歌曲<text:span text:style-name="T1">，加入其他人的歌曲</text:span></text:p>
        </text:list-item>
        <text:list-item>
          <text:p text:style-name="P6">預約練團室時段，避免時段衝突 </text:p>
        </text:list-item>
        <text:list-item>
          <text:p text:style-name="P6">修改個人密碼，確保帳號安全</text:p>
        </text:list-item>
      </text:list>
      <text:p text:style-name="P5"/>
      <text:p text:style-name="P5"/>
      <text:p text:style-name="P5"><text:soft-page-break/></text:p>
      <text:p text:style-name="P5"><text:span text:style-name="T2">社團幹部需求</text:span><text:span text:style-name="T3">：</text:span></text:p>
      <text:list text:style-name="L2">
        <text:list-item>
          <text:p text:style-name="P7">具備一般社員之所有功能</text:p>
        </text:list-item>
        <text:list-item>
          <text:p text:style-name="P7">管理社員帳號，包含新增與刪除社員</text:p>
        </text:list-item>
        <text:list-item>
          <text:p text:style-name="P7">發布、編輯及刪除社團公告</text:p>
        </text:list-item>
        <text:list-item>
          <text:p text:style-name="P7">瀏覽所有歌曲提議與預約記錄</text:p>
        </text:list-item>
      </text:list>
      <text:p text:style-name="P8"/>
      <text:h text:style-name="P9" text:outline-level="3"><text:bookmark-start text:name="功能權限對照"/>2.2 <text:bookmark-end text:name="功能權限對照"/><text:span text:style-name="T1">功能性需求</text:span></text:h>
      <text:h text:style-name="P10" text:outline-level="3"><text:span text:style-name="T4">1. </text:span>認證與授權</text:h>
      <text:p text:style-name="P11">本系統之核心架構旨在建立一個既安全又方便的工作環境。在安全性與權限控管方面，必須實作穩健的認證機制。實體使用者需透過帳號與密碼進行登入，且系統將強制規定所有初次登入者必須更改密碼。此外，系統引入RBAC，嚴格依據 Member（社員）與 Officer（幹部）的身分，來限制後端 API 與前端視圖的存取權限。</text:p>
      <text:h text:style-name="P12" text:outline-level="3">2. 社員管理</text:h>
      <text:p text:style-name="P5"><text:span text:style-name="T5">在使用者生命週期管理層面，社團幹部被授予完整的使用者管理權限。幹部能夠初始化新建的社員帳號，並由系統自動配發初始密碼；針對已退社的人，社團幹部亦具備註銷、刪除或將其帳號停權之權限，以維持系統名冊。</text:span></text:p>
      <text:h text:style-name="P12" text:outline-level="3">3. 公告廣播</text:h>
      <text:p text:style-name="P13">在資訊傳遞方面，有貼文的功能允許未登入的一般訪客進行無障礙的公開瀏覽。然而，針對公告內容的 CRUD 操作，則嚴格限制僅有 Officer 能夠執行，以確保資訊來源的正確性。</text:p>
      <text:h text:style-name="P12" text:outline-level="3">4. 開歌系統</text:h>
      <text:p text:style-name="P14">社團內部在決定表演曲目時的核心機制。提案者先決定歌曲輸入系統，其餘社員可在系統中查看並申請加入。提案者可以預約練團室。</text:p>
      <text:p text:style-name="P14"/>
      <text:p text:style-name="P15"/>
      <text:p text:style-name="P15"><text:soft-page-break/></text:p>
      <text:h text:style-name="P12" text:outline-level="3">5. 場地預約系統</text:h>
      <text:p text:style-name="P14">為滿足上述排練需求，提議之發起人有權針對所選歌曲，進一步向系統預約特定時段的練團室。在處理這些預約請求時，系統必須執行嚴格的 Mutual Exclusion 檢查，不能讓任何預約時段發生重疊。此外，為了避免長期佔用，單次預約的時間限制不得超過 3 小時。若需取消預約，僅有該次預約的建立者或具備管理權限的社團幹部，才有權限取消該筆紀錄。</text:p>
      <text:h text:style-name="P16" text:outline-level="3"><text:bookmark-start text:name="功能權限對照 Copy 1"/>2.<text:span text:style-name="T6">3</text:span> <text:bookmark-end text:name="功能權限對照 Copy 1"/><text:span text:style-name="T1">非</text:span>功能性需求</text:h>
      <text:p text:style-name="P17">安全性</text:p>
      <text:p text:style-name="P18">密碼必須以雜湊演算法單向加密儲存於資料庫；API 傳輸需使用 JWT 進行無狀態驗證。</text:p>
      <text:p text:style-name="P18"><text:span text:style-name="T2">效能與併發</text:span></text:p>
      <text:p text:style-name="P18">面對期初/期末考完等熱門練團預約時段，API 回應時間應在 500 毫秒內，且需確保預約寫入時不會產生 <text:span text:style-name="T2">Race Condition</text:span>。</text:p>
      <text:p text:style-name="P19">可用性</text:p>
      <text:p text:style-name="P20">前端採用 <text:span text:style-name="T2">Single Page Application</text:span>架構，確保頁面切換無須重新載入，提供流暢的應用程式體驗。</text:p>
      <text:p text:style-name="P21">2.4 <text:span text:style-name="T1">使用案例圖</text:span></text:p>
      <text:p text:style-name="P22"><draw:frame draw:style-name="fr1" draw:name="Image1" text:anchor-type="char" svg:x="1.0736in" svg:y="0.1535in" svg:width="4.928in" svg:height="4.2516in" draw:z-index="0"><draw:image xlink:href="Pictures/10001AC90000495000003F4176FB7803.svg" xlink:type="simple" xlink:show="embed" xlink:actuate="onLoad" draw:mime-type="image/svg+xml"/><draw:image xlink:href="Pictures/10000001000002C500000264C60CB905.png" xlink:type="simple" xlink:show="embed" xlink:actuate="onLoad" draw:mime-type="image/png"/></draw:frame></text:p>
      <text:p text:style-name="P23"/>
      <text:h text:style-name="P24" text:outline-level="2"/>
      <text:p text:style-name="P25"/>
      <text:p text:style-name="P25"/>
      <text:p text:style-name="P25"/>
      <text:p text:style-name="P25"/>
      <text:p text:style-name="P25"/>
      <text:p text:style-name="P26"/>
      <text:p text:style-name="P26"><text:soft-page-break/>2.5 使用案例規格表</text:p>
      <text:p text:style-name="P27"><text:span text:style-name="T7">2.5.1 登入與修改密碼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1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9">使用案例名稱</text:p>
          </table:table-cell>
          <table:table-cell table:style-name="Table1.A1" office:value-type="string">
            <text:p text:style-name="P30"><text:span text:style-name="Source_20_Text">UC-0</text:span><text:span text:style-name="Source_20_Text"><text:span text:style-name="T9">1</text:span></text:span><text:span text:style-name="Source_20_Text"><text:span text:style-name="T10">:</text:span></text:span>登入與修改密碼</text:p>
          </table:table-cell>
        </table:table-row>
        <table:table-row>
          <table:table-cell table:style-name="Table1.A1" office:value-type="string">
            <text:p text:style-name="P29">主要參與者</text:p>
          </table:table-cell>
          <table:table-cell table:style-name="Table1.A1" office:value-type="string">
            <text:p text:style-name="P31">一般社員 (Member)、社團幹部 (Officer)</text:p>
          </table:table-cell>
        </table:table-row>
        <table:table-row>
          <table:table-cell table:style-name="Table1.A1" office:value-type="string">
            <text:p text:style-name="P29">前置條件</text:p>
          </table:table-cell>
          <table:table-cell table:style-name="Table1.A1" office:value-type="string">
            <text:p text:style-name="P31">使用者帳號已存在於資料庫中。</text:p>
          </table:table-cell>
        </table:table-row>
        <table:table-row>
          <table:table-cell table:style-name="Table1.A1" office:value-type="string">
            <text:p text:style-name="P32"><text:span text:style-name="T11">主要流程 </text:span><text:span text:style-name="T12">(Main Flow)</text:span></text:p>
          </table:table-cell>
          <table:table-cell table:style-name="Table1.A1" office:value-type="string">
            <text:p text:style-name="P31">1. 使用者於前端點擊「<text:span text:style-name="T1">登入</text:span>」按鈕，觸發登入模態框。</text:p>
            <text:p text:style-name="P31">2. 使用者輸入 <text:span text:style-name="Source_20_Text">username</text:span> 與 <text:span text:style-name="Source_20_Text">password</text:span> 並提交。</text:p>
            <text:p text:style-name="P31">3. 前端透過 POST 呼叫 <text:span text:style-name="Source_20_Text">/api/v1/auth/login</text:span>。</text:p>
            <text:p text:style-name="P31">4. 後端驗證密碼雜湊值是否正確，並檢查該帳號之 <text:span text:style-name="Source_20_Text">is_first_login</text:span> 標記。</text:p>
            <text:p text:style-name="P31">5. 系統確認該帳號為初次登入，後端回傳特定狀態碼，前端強制彈出密碼修改模態框。</text:p>
            <text:p text:style-name="P31">6. 使用者輸入新密碼（滿足至少 8 字元限制）並確認。</text:p>
            <text:p text:style-name="P31">7. 前端呼叫 <text:span text:style-name="Source_20_Text">/api/v1/auth/change-password</text:span> 更新資料，清除 <text:span text:style-name="Source_20_Text">is_first_login</text:span> 標記。</text:p>
            <text:p text:style-name="P31">8. 後端回傳新變更後的 Token，前端將其寫入瀏覽器 LocalStorage，完成登入。</text:p>
          </table:table-cell>
        </table:table-row>
        <table:table-row>
          <table:table-cell table:style-name="Table1.A1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1.A1" office:value-type="string">
            <text:p text:style-name="P31">4a. 若憑證錯誤，後端回傳 <text:span text:style-name="Source_20_Text">401 Unauthorized</text:span>，前端顯示「帳號或密碼錯誤」並清空輸入框。</text:p>
            <text:p text:style-name="P31">5a. 若該帳號非首次登入，系統跳過修改密碼步驟，直接發放Token 並導入首頁。</text:p>
          </table:table-cell>
        </table:table-row>
        <table:table-row>
          <table:table-cell table:style-name="Table1.A1" office:value-type="string">
            <text:p text:style-name="P29">後置條件</text:p>
          </table:table-cell>
          <table:table-cell table:style-name="Table1.A1" office:value-type="string">
            <text:p text:style-name="P31">使用者取得有效的安全憑證（JWT Token），系統狀態變更為「已登入」，權限依據資料庫 Role 欄位進行鎖定</text:p>
          </table:table-cell>
        </table:table-row>
      </table:table>
      <text:p text:style-name="P27"><text:soft-page-break/><text:span text:style-name="T7">2.5.2 管理社員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8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 table:style-name="Table8.2">
          <table:table-cell table:style-name="Table8.A1" office:value-type="string">
            <text:p text:style-name="P29">使用案例名稱</text:p>
          </table:table-cell>
          <table:table-cell table:style-name="Table8.B2" office:value-type="string">
            <text:p text:style-name="P30"><text:span text:style-name="Source_20_Text">UC-0</text:span><text:span text:style-name="Source_20_Text"><text:span text:style-name="T9">2:</text:span></text:span>管理社員</text:p>
          </table:table-cell>
        </table:table-row>
        <table:table-row table:style-name="Table8.2">
          <table:table-cell table:style-name="Table8.A3" office:value-type="string">
            <text:p text:style-name="P29">主要參與者</text:p>
          </table:table-cell>
          <table:table-cell table:style-name="Table8.B3" office:value-type="string">
            <text:p text:style-name="P31">社團幹部 (Officer)</text:p>
          </table:table-cell>
        </table:table-row>
        <table:table-row table:style-name="Table8.2">
          <table:table-cell table:style-name="Table8.A4" office:value-type="string">
            <text:p text:style-name="P29">前置條件</text:p>
          </table:table-cell>
          <table:table-cell table:style-name="Table8.B3" office:value-type="string">
            <text:p text:style-name="P31">參與者已登入，且經 JWT 驗證其角色權限為 <text:span text:style-name="Source_20_Text">Officer</text:span>。</text:p>
          </table:table-cell>
        </table:table-row>
        <table:table-row table:style-name="Table8.2">
          <table:table-cell table:style-name="Table8.A5" office:value-type="string">
            <text:p text:style-name="P32"><text:span text:style-name="T11">主要流程 </text:span><text:span text:style-name="T12">(Main Flow)</text:span></text:p>
          </table:table-cell>
          <table:table-cell table:style-name="Table8.B3" office:value-type="string">
            <text:p text:style-name="P31">1. 幹部切換至「<text:span text:style-name="T1">成員管理</text:span>」分頁。</text:p>
            <text:p text:style-name="P31">2. 前端向 <text:span text:style-name="Source_20_Text">/api/v1/users</text:span> 發送 GET 請求，後端回傳所有社員之名冊列表（不含密碼雜湊）。</text:p>
            <text:p text:style-name="P31">3. 新增社員：幹部點擊「新增社員」，輸入該員學號與姓名。後端以 POST 處理，自動生成隨機臨時密碼，儲存後將臨時密碼回傳給幹部。</text:p>
            <text:p text:style-name="P31">4. 刪除社員：幹部於列表中對特定社員點擊「<text:span text:style-name="T1">刪除</text:span>」，前端發送 DELETE 請求至 <text:span text:style-name="Source_20_Text">/api/v1/users/{id}</text:span>，後端於資料庫中移除該紀錄。</text:p>
          </table:table-cell>
        </table:table-row>
        <table:table-row table:style-name="Table8.2">
          <table:table-cell table:style-name="Table8.A1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8.B6" office:value-type="string">
            <text:p text:style-name="P31">1a. 一般社員（Member）若嘗試存取此頁面，前端不予顯示連結；若直接對 API 發送請求，後端 RBAC 機制將攔截並回傳 <text:span text:style-name="Source_20_Text">403 Forbidden</text:span>。</text:p>
          </table:table-cell>
        </table:table-row>
        <table:table-row>
          <table:table-cell table:style-name="Table8.A1" office:value-type="string">
            <text:p text:style-name="P29">後置條件</text:p>
          </table:table-cell>
          <table:table-cell table:style-name="Table8.A1" office:value-type="string">
            <text:p text:style-name="P32"><text:span text:style-name="T8">資料庫中 </text:span><text:span text:style-name="Source_20_Text"><text:span text:style-name="T13">users</text:span></text:span><text:span text:style-name="T13"> </text:span><text:span text:style-name="T8">資料表完成變更，使用者名冊即時更新。</text:span></text:p>
          </table:table-cell>
        </table:table-row>
      </table:table>
      <text:p text:style-name="P27"/>
      <text:p text:style-name="P27"/>
      <text:p text:style-name="P27"/>
      <text:p text:style-name="P33"/>
      <text:p text:style-name="P33"/>
      <text:p text:style-name="P33"/>
      <text:p text:style-name="P33"/>
      <text:p text:style-name="P33"><text:soft-page-break/>2.5.3 公告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12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 table:style-name="Table12.2">
          <table:table-cell table:style-name="Table12.A1" office:value-type="string">
            <text:p text:style-name="P29">使用案例名稱</text:p>
          </table:table-cell>
          <table:table-cell table:style-name="Table12.B2" office:value-type="string">
            <text:p text:style-name="P31">UC-03a: 管理公告</text:p>
          </table:table-cell>
        </table:table-row>
        <table:table-row table:style-name="Table12.2">
          <table:table-cell table:style-name="Table12.A3" office:value-type="string">
            <text:p text:style-name="P29">主要參與者</text:p>
          </table:table-cell>
          <table:table-cell table:style-name="Table12.B3" office:value-type="string">
            <text:p text:style-name="P31">社團幹部 (Officer)</text:p>
          </table:table-cell>
        </table:table-row>
        <table:table-row table:style-name="Table12.2">
          <table:table-cell table:style-name="Table12.A4" office:value-type="string">
            <text:p text:style-name="P29">前置條件</text:p>
          </table:table-cell>
          <table:table-cell table:style-name="Table12.B3" office:value-type="string">
            <text:p text:style-name="P31">參與者已登入，且安全憑證確認為 <text:span text:style-name="Source_20_Text">Officer</text:span>。</text:p>
          </table:table-cell>
        </table:table-row>
        <table:table-row table:style-name="Table12.2">
          <table:table-cell table:style-name="Table12.A5" office:value-type="string">
            <text:p text:style-name="P32"><text:span text:style-name="T11">主要流程 </text:span><text:span text:style-name="T12">(Main Flow)</text:span></text:p>
          </table:table-cell>
          <table:table-cell table:style-name="Table12.B3" office:value-type="string">
            <text:p text:style-name="P31">1. 幹部於「<text:span text:style-name="T1">公告欄</text:span>」頁面點擊「<text:span text:style-name="T1">新增公告</text:span>」按鈕。</text:p>
            <text:p text:style-name="P31">2. 輸入公告標題與詳細內文，點擊送出。</text:p>
            <text:p text:style-name="P31">3. 前端呼叫 POST <text:span text:style-name="Source_20_Text">/api/v1/announcements</text:span>，後端將資料與當前幹部之 ID 綁定，寫入資料庫並觸發全域狀態刷新。</text:p>
            <text:p text:style-name="P31">4. 編輯/刪除：幹部亦可對既有公告點擊「<text:span text:style-name="T1">編輯</text:span>」或「<text:span text:style-name="T1">刪除</text:span>」，分別發送 PATCH 或 DELETE 請求至對應的 <text:span text:style-name="Source_20_Text">/api/v1/announcements/{id}</text:span> 端點。</text:p>
          </table:table-cell>
        </table:table-row>
        <table:table-row table:style-name="Table12.2">
          <table:table-cell table:style-name="Table12.A6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12.B3" office:value-type="string">
            <text:p text:style-name="P31">3a. 若提交之表單欄位為空，後端 Pydantic 資料驗證層會攔截請求，回傳 <text:span text:style-name="Source_20_Text">422 Unprocessable Entity</text:span>，前端提示「標題或內容不可為空」。</text:p>
          </table:table-cell>
        </table:table-row>
        <table:table-row table:style-name="Table12.2">
          <table:table-cell table:style-name="Table12.A1" office:value-type="string">
            <text:p text:style-name="P29">後置條件</text:p>
          </table:table-cell>
          <table:table-cell table:style-name="Table12.B2" office:value-type="string">
            <text:p text:style-name="P31">公告資料表完成寫入、更新或刪除，所有使用者刷新頁面後皆可看見變更。</text:p>
          </table:table-cell>
        </table:table-row>
      </table:table>
      <text:p text:style-name="P33"/>
      <text:p text:style-name="P33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13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 table:style-name="Table13.2">
          <table:table-cell table:style-name="Table13.A1" office:value-type="string">
            <text:p text:style-name="P29">使用案例名稱</text:p>
          </table:table-cell>
          <table:table-cell table:style-name="Table13.B2" office:value-type="string">
            <text:p text:style-name="P31">UC-03b: 管理公告</text:p>
          </table:table-cell>
        </table:table-row>
        <table:table-row table:style-name="Table13.2">
          <table:table-cell table:style-name="Table13.A3" office:value-type="string">
            <text:p text:style-name="P29">主要參與者</text:p>
          </table:table-cell>
          <table:table-cell table:style-name="Table13.B3" office:value-type="string">
            <text:p text:style-name="P31">社團幹部 (Officer)</text:p>
          </table:table-cell>
        </table:table-row>
        <text:soft-page-break/>
        <table:table-row table:style-name="Table13.2">
          <table:table-cell table:style-name="Table13.A4" office:value-type="string">
            <text:p text:style-name="P29">前置條件</text:p>
          </table:table-cell>
          <table:table-cell table:style-name="Table13.B3" office:value-type="string">
            <text:p text:style-name="P31">參與者已登入，且安全憑證確認為 <text:span text:style-name="Source_20_Text">Officer</text:span>。</text:p>
          </table:table-cell>
        </table:table-row>
        <table:table-row table:style-name="Table13.2">
          <table:table-cell table:style-name="Table13.A5" office:value-type="string">
            <text:p text:style-name="P32"><text:span text:style-name="T11">主要流程 </text:span><text:span text:style-name="T12">(Main Flow)</text:span></text:p>
          </table:table-cell>
          <table:table-cell table:style-name="Table13.B3" office:value-type="string">
            <text:p text:style-name="P31">1. 幹部於「<text:span text:style-name="T1">公告</text:span>」頁面點擊「<text:span text:style-name="T1">新增</text:span>」按鈕。</text:p>
            <text:p text:style-name="P31">2. 輸入公告標題與詳細內文，點擊送出。</text:p>
            <text:p text:style-name="P31">3. 前端呼叫 POST <text:span text:style-name="Source_20_Text">/api/v1/announcements</text:span>，後端將資料與當前幹部之 ID 綁定，寫入資料庫並觸發全域狀態刷新。</text:p>
            <text:p text:style-name="P31">4. 編輯/刪除：幹部亦可對既有公告點擊「<text:span text:style-name="T1">編輯</text:span>」或「<text:span text:style-name="T1">刪除</text:span>」，分別發送 PATCH 或 DELETE 請求至對應的 <text:span text:style-name="Source_20_Text">/api/v1/announcements/{id}</text:span> 端點。</text:p>
          </table:table-cell>
        </table:table-row>
        <table:table-row table:style-name="Table13.2">
          <table:table-cell table:style-name="Table13.A6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13.B3" office:value-type="string">
            <text:p text:style-name="P31">3a. 若提交之表單欄位為空，後端 Pydantic 資料驗證層會攔截請求，回傳 <text:span text:style-name="Source_20_Text">422 Unprocessable Entity</text:span>，前端提示「標題或內容不可為空」。</text:p>
          </table:table-cell>
        </table:table-row>
        <table:table-row table:style-name="Table13.2">
          <table:table-cell table:style-name="Table13.A1" office:value-type="string">
            <text:p text:style-name="P29">後置條件</text:p>
          </table:table-cell>
          <table:table-cell table:style-name="Table13.B2" office:value-type="string">
            <text:p text:style-name="P31">公告資料表完成寫入、更新或刪除，所有使用者刷新頁面後皆可看見變更。</text:p>
          </table:table-cell>
        </table:table-row>
      </table:table>
      <text:p text:style-name="P33"/>
      <text:p text:style-name="P33"/>
      <text:p text:style-name="P34">2.5.<text:span text:style-name="T9">4</text:span> 歌曲提案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9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>
          <table:table-cell table:style-name="Table9.A1" office:value-type="string">
            <text:p text:style-name="P29">使用案例名稱</text:p>
          </table:table-cell>
          <table:table-cell table:style-name="Table9.A1" office:value-type="string">
            <text:p text:style-name="P31"><text:span text:style-name="T9">UC-04</text:span><text:span text:style-name="T10">: </text:span>提議歌曲與加入</text:p>
          </table:table-cell>
        </table:table-row>
        <table:table-row>
          <table:table-cell table:style-name="Table9.A1" office:value-type="string">
            <text:p text:style-name="P29">主要參與者</text:p>
          </table:table-cell>
          <table:table-cell table:style-name="Table9.A1" office:value-type="string">
            <text:p text:style-name="P31">一般社員 (Member)、社團幹部 (Officer)</text:p>
          </table:table-cell>
        </table:table-row>
        <table:table-row>
          <table:table-cell table:style-name="Table9.A1" office:value-type="string">
            <text:p text:style-name="P29">前置條件</text:p>
          </table:table-cell>
          <table:table-cell table:style-name="Table9.A1" office:value-type="string">
            <text:p text:style-name="P31">使用者已成功登入。</text:p>
          </table:table-cell>
        </table:table-row>
        <table:table-row>
          <table:table-cell table:style-name="Table9.A1" office:value-type="string">
            <text:p text:style-name="P32"><text:span text:style-name="T11">主要流程 </text:span><text:span text:style-name="T12">(Main </text:span><text:soft-page-break/><text:span text:style-name="T12">Flow)</text:span></text:p>
          </table:table-cell>
          <table:table-cell table:style-name="Table9.A1" office:value-type="string">
            <text:p text:style-name="P31">1. 使用者切換至「<text:span text:style-name="T1">歌曲提案</text:span>」頁面。</text:p>
            <text:p text:style-name="P31"><text:soft-page-break/>2. 點擊「+ 新增提案」，輸入欲練習的歌曲名稱（如：歌名與團名）。</text:p>
            <text:p text:style-name="P31">3. 前端發送 POST 請求至 /api/v1/song-proposals，後端建立該歌曲紀錄。</text:p>
            <text:p text:style-name="P31">4. 加入歌曲：其他社員瀏覽列表時，<text:span text:style-name="T1">可看見所有歌曲。填入欲負責的樂器後</text:span>，點擊該按鈕<text:span text:style-name="T1">送出申請</text:span>。</text:p>
            <text:p text:style-name="P31">5. 前端發送 POST 請求至 /api/v1/song-proposals/{id}/join，指定加入之樂器欄位，後端更新關聯表。</text:p>
          </table:table-cell>
        </table:table-row>
        <table:table-row>
          <table:table-cell table:style-name="Table9.A1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9.A1" office:value-type="string">
            <text:p text:style-name="P31">5a. 若某一樂器角色已被其他社員搶先登記，後端驗證邏輯會判定該職位已被佔用，回傳 409 Conflict，前端提示「該樂器已有社員登記，請選擇其他角色」。</text:p>
          </table:table-cell>
        </table:table-row>
        <table:table-row>
          <table:table-cell table:style-name="Table9.A1" office:value-type="string">
            <text:p text:style-name="P29">後置條件</text:p>
          </table:table-cell>
          <table:table-cell table:style-name="Table9.A1" office:value-type="string">
            <text:p text:style-name="P31">歌曲提議資料表與樂器配置關聯表更新，該歌曲之編組進度對全體社員公開。</text:p>
          </table:table-cell>
        </table:table-row>
      </table:table>
      <text:p text:style-name="P35"/>
      <text:p text:style-name="P35"/>
      <text:p text:style-name="P36">2.5.<text:span text:style-name="T9">5</text:span> 預約練團室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10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29">使用案例名稱</text:p>
          </table:table-cell>
          <table:table-cell table:style-name="Table10.A1" office:value-type="string">
            <text:p text:style-name="P31"><text:span text:style-name="T9">UC05: </text:span>預約練團室</text:p>
          </table:table-cell>
        </table:table-row>
        <table:table-row>
          <table:table-cell table:style-name="Table10.A1" office:value-type="string">
            <text:p text:style-name="P29">主要參與者</text:p>
          </table:table-cell>
          <table:table-cell table:style-name="Table10.A1" office:value-type="string">
            <text:p text:style-name="P31">一般社員（必須為歌曲發起人）、社團幹部 (Officer)</text:p>
          </table:table-cell>
        </table:table-row>
        <table:table-row>
          <table:table-cell table:style-name="Table10.A1" office:value-type="string">
            <text:p text:style-name="P29">前置條件</text:p>
          </table:table-cell>
          <table:table-cell table:style-name="Table10.A1" office:value-type="string">
            <text:p text:style-name="P31">使用者已登入，且至少擁有一首其所發起的「歌曲提議」。</text:p>
          </table:table-cell>
        </table:table-row>
        <table:table-row>
          <table:table-cell table:style-name="Table10.A1" office:value-type="string">
            <text:p text:style-name="P32"><text:span text:style-name="T11">主要流程 </text:span><text:span text:style-name="T12">(Main Flow)</text:span></text:p>
          </table:table-cell>
          <table:table-cell table:style-name="Table10.A1" office:value-type="string">
            <text:p text:style-name="P31">1. 使用者進入「<text:span text:style-name="T1">預約場地</text:span>」頁面，檢視預約時間表。</text:p>
            <text:p text:style-name="P31">2. 點擊「+ 新增預約」開啟預約表單。</text:p>
            <text:p text:style-name="P31"><text:soft-page-break/>3. 系統下拉選單自動列出該使用者擔任發起人之歌曲，使用者選定歌曲、日期、開始時間與結束時間。</text:p>
            <text:p text:style-name="P31">4. 前端發送 POST 請求至 <text:span text:style-name="Source_20_Text">/api/v1/bookings</text:span>。</text:p>
            <text:p text:style-name="P31">5. 後端檢查預約區間：是否小於或等於 3 小時。</text:p>
            <text:p text:style-name="P31">6. 後端執行時間重疊判定，確認該時段無其他核准之預約。</text:p>
            <text:p text:style-name="P31">7. 通過驗證，寫入 <text:span text:style-name="Source_20_Text">bookings</text:span> 資料表，回傳 <text:span text:style-name="Source_20_Text">201 Created</text:span>。</text:p>
          </table:table-cell>
        </table:table-row>
        <table:table-row>
          <table:table-cell table:style-name="Table10.A1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10.A1" office:value-type="string">
            <text:p text:style-name="P31">5a. 若單次預約時間長度大於 3 小時，後端拒絕並回傳 <text:span text:style-name="Source_20_Text">400 Bad Request</text:span>，提示「預約時間不可超過 3 小時」。</text:p>
            <text:p text:style-name="P31">6a. 若目標時段已被佔用，資料庫查詢回傳衝突，後端拒絕並回傳 <text:span text:style-name="Source_20_Text">409 Conflict</text:span>，提示「該時段已被預約，請選擇其他時間」。</text:p>
          </table:table-cell>
        </table:table-row>
        <table:table-row>
          <table:table-cell table:style-name="Table10.A1" office:value-type="string">
            <text:p text:style-name="P29">後置條件</text:p>
          </table:table-cell>
          <table:table-cell table:style-name="Table10.A1" office:value-type="string">
            <text:p text:style-name="P31">資料庫新增一筆狀態為確認的預約紀錄，該時段在全局課表中被動態鎖定。</text:p>
          </table:table-cell>
        </table:table-row>
      </table:table>
      <text:p text:style-name="P33"/>
      <text:p text:style-name="P33">2.5.6 取消預約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8"><text:span text:style-name="Strong_20_Emphasis"><text:span text:style-name="T8">欄位</text:span></text:span></text:p>
            </table:table-cell>
            <table:table-cell table:style-name="Table11.A1" office:value-type="string">
              <text:p text:style-name="P28"><text:span text:style-name="Strong_20_Emphasis"><text:span text:style-name="T8">描述</text:span></text:span></text:p>
            </table:table-cell>
          </table:table-row>
        </table:table-header-rows>
        <table:table-row table:style-name="Table11.2">
          <table:table-cell table:style-name="Table11.A1" office:value-type="string">
            <text:p text:style-name="P29">使用案例名稱</text:p>
          </table:table-cell>
          <table:table-cell table:style-name="Table11.B2" office:value-type="string">
            <text:p text:style-name="P31"><text:span text:style-name="T9">UC06: </text:span>取消預約</text:p>
          </table:table-cell>
        </table:table-row>
        <table:table-row table:style-name="Table11.2">
          <table:table-cell table:style-name="Table11.A1" office:value-type="string">
            <text:p text:style-name="P29">主要參與者</text:p>
          </table:table-cell>
          <table:table-cell table:style-name="Table11.B3" office:value-type="string">
            <text:p text:style-name="P31">一般社員 (Member)、社團幹部 (Officer)</text:p>
          </table:table-cell>
        </table:table-row>
        <table:table-row table:style-name="Table11.2">
          <table:table-cell table:style-name="Table11.A1" office:value-type="string">
            <text:p text:style-name="P29">前置條件</text:p>
          </table:table-cell>
          <table:table-cell table:style-name="Table11.B3" office:value-type="string">
            <text:p text:style-name="P31">使用者已登入，且系統中存在至少一筆未來的預約紀錄。</text:p>
          </table:table-cell>
        </table:table-row>
        <table:table-row table:style-name="Table11.2">
          <table:table-cell table:style-name="Table11.A1" office:value-type="string">
            <text:p text:style-name="P32"><text:span text:style-name="T11">主要流程 </text:span><text:span text:style-name="T12">(Main Flow)</text:span></text:p>
          </table:table-cell>
          <table:table-cell table:style-name="Table11.B3" office:value-type="string">
            <text:p text:style-name="P31">1. 使用者在「Bookings」行程表或個人面板中，選定一筆<text:soft-page-break/>預約，點擊「<text:span text:style-name="T1">取消預約</text:span>」按鈕。</text:p>
            <text:p text:style-name="P31">2. 前端向 <text:span text:style-name="Source_20_Text">/api/v1/bookings/{id}/cancel</text:span> 發送 PATCH 請求。</text:p>
            <text:p text:style-name="P31">3. 後端解析 Token，提取當前操作者之 <text:span text:style-name="Source_20_Text">user_id</text:span> 與 <text:span text:style-name="Source_20_Text">role</text:span>。</text:p>
            <text:p text:style-name="P31">4. 後端驗證權限：確認該 <text:span text:style-name="Source_20_Text">user_id</text:span> 是否為該筆預約的「原始建立者」。</text:p>
            <text:p text:style-name="P31">5. 驗證通過，後端將該預約之狀態標記為已取消（或從資料庫中刪除），釋放該時段權限，回傳 <text:span text:style-name="Source_20_Text">200 OK</text:span>。</text:p>
          </table:table-cell>
        </table:table-row>
        <table:table-row table:style-name="Table11.2">
          <table:table-cell table:style-name="Table11.A1" office:value-type="string">
            <text:p text:style-name="P32"><text:span text:style-name="T11">替代</text:span><text:span text:style-name="T12">/</text:span><text:span text:style-name="T11">例外流程 </text:span><text:span text:style-name="T12">(Alternative/Exception Flow)</text:span></text:p>
          </table:table-cell>
          <table:table-cell table:style-name="Table11.B3" office:value-type="string">
            <text:p text:style-name="P31">4a. 若操作者非該預約之建立者，但其 <text:span text:style-name="Source_20_Text">role</text:span> 為 <text:span text:style-name="Source_20_Text">Officer</text:span>（幹部），系統允許執行強制取消，流程直接跳至步驟 5。</text:p>
            <text:p text:style-name="P31">4b. 若操作者既非建立者亦非幹部，後端攔截請求，回傳 <text:span text:style-name="Source_20_Text">403 Forbidden</text:span>，拒絕修改。</text:p>
          </table:table-cell>
        </table:table-row>
        <table:table-row table:style-name="Table11.2">
          <table:table-cell table:style-name="Table11.A1" office:value-type="string">
            <text:p text:style-name="P29">後置條件</text:p>
          </table:table-cell>
          <table:table-cell table:style-name="Table11.B3" office:value-type="string">
            <text:p text:style-name="P31">資料庫更新，原預約時段釋放，其他社員即可對該時段重新發起 <text:span text:style-name="Source_20_Text">UC-05</text:span> 預約。</text:p>
          </table:table-cell>
        </table:table-row>
      </table:table>
      <text:p text:style-name="P33"/>
      <text:h text:style-name="P24" text:outline-level="2" text:is-list-header="true"/>
      <text:h text:style-name="P37" text:outline-level="2"/>
      <text:h text:style-name="P38" text:outline-level="2"><text:bookmark-start text:name="三系統功能規格"/>三、系統功能規格<text:bookmark-end text:name="三系統功能規格"/></text:h>
      <text:h text:style-name="Heading_20_3" text:outline-level="3"><text:bookmark-start text:name="路由設計"/>3.1 路由設計<text:bookmark-end text:name="路由設計"/></text:h>
      <text:p text:style-name="First_20_paragraph">本系統以後端 API 方式提供服務，所有 API 端點均以 <text:span text:style-name="Source_5f_Text">/api/v1</text:span> 為前綴，以下為完整路由表。</text:p>
      <text:p text:style-name="P39"><text:span text:style-name="T14">1. </text:span>認證（Auth）</text:p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>HTTP 方法</text:p>
            </table:table-cell>
            <table:table-cell table:style-name="Table2.A1" office:value-type="string">
              <text:p text:style-name="Table_20_Heading">路徑</text:p>
            </table:table-cell>
            <table:table-cell table:style-name="Table2.A1" office:value-type="string">
              <text:p text:style-name="Table_20_Heading">權限</text:p>
            </table:table-cell>
            <table:table-cell table:style-name="Table2.A1" office:value-type="string">
              <text:p text:style-name="Table_20_Heading">說明</text:p>
            </table:table-cell>
          </table:table-row>
        </table:table-header-rows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/auth/login</text:p>
          </table:table-cell>
          <table:table-cell table:style-name="Table2.A1" office:value-type="string">
            <text:p text:style-name="Table_20_Contents">公開</text:p>
          </table:table-cell>
          <table:table-cell table:style-name="Table2.A1" office:value-type="string">
            <text:p text:style-name="Table_20_Contents">登入，回傳 JWT Token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/auth/change-password</text:p>
          </table:table-cell>
          <table:table-cell table:style-name="Table2.A1" office:value-type="string">
            <text:p text:style-name="Table_20_Contents">需登入</text:p>
          </table:table-cell>
          <table:table-cell table:style-name="Table2.A1" office:value-type="string">
            <text:p text:style-name="Table_20_Contents">修改密碼，清除首次登入標記</text:p>
          </table:table-cell>
        </table:table-row>
      </table:table>
      <text:p text:style-name="P40"><text:span text:style-name="T14">2. </text:span>社員管理（Users）</text:p>
      <table:table table:name="Table3" table:style-name="Table3">
        <table:table-column table:style-name="Table3.A" table:number-columns-repeated="3"/>
        <table:table-column table:style-name="Table3.D"/>
        <table:table-header-rows>
          <table:table-row>
            <table:table-cell table:style-name="Table3.A1" office:value-type="string">
              <text:p text:style-name="Table_20_Heading">HTTP 方法</text:p>
            </table:table-cell>
            <table:table-cell table:style-name="Table3.A1" office:value-type="string">
              <text:p text:style-name="Table_20_Heading">路徑</text:p>
            </table:table-cell>
            <table:table-cell table:style-name="Table3.A1" office:value-type="string">
              <text:p text:style-name="Table_20_Heading">權限</text:p>
            </table:table-cell>
            <table:table-cell table:style-name="Table3.A1" office:value-type="string">
              <text:p text:style-name="Table_20_Heading">說明</text:p>
            </table:table-cell>
          </table:table-row>
        </table:table-header-rows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/users</text:p>
          </table:table-cell>
          <table:table-cell table:style-name="Table3.A1" office:value-type="string">
            <text:p text:style-name="Table_20_Contents">幹部</text:p>
          </table:table-cell>
          <table:table-cell table:style-name="Table3.A1" office:value-type="string">
            <text:p text:style-name="Table_20_Contents">列出所有社員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/users</text:p>
          </table:table-cell>
          <table:table-cell table:style-name="Table3.A1" office:value-type="string">
            <text:p text:style-name="Table_20_Contents">幹部</text:p>
          </table:table-cell>
          <table:table-cell table:style-name="Table3.A1" office:value-type="string">
            <text:p text:style-name="Table_20_Contents">新增社員，回傳臨時密碼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/users/{id}</text:p>
          </table:table-cell>
          <table:table-cell table:style-name="Table3.A1" office:value-type="string">
            <text:p text:style-name="Table_20_Contents">幹部</text:p>
          </table:table-cell>
          <table:table-cell table:style-name="Table3.A1" office:value-type="string">
            <text:p text:style-name="Table_20_Contents">刪除指定社員（不可刪除自己）</text:p>
          </table:table-cell>
        </table:table-row>
      </table:table>
      <text:p text:style-name="P40"><text:span text:style-name="T14">3. </text:span>公告（Announcements）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Table_20_Heading">HTTP 方法</text:p>
            </table:table-cell>
            <table:table-cell table:style-name="Table4.A1" office:value-type="string">
              <text:p text:style-name="Table_20_Heading">路徑</text:p>
            </table:table-cell>
            <table:table-cell table:style-name="Table4.A1" office:value-type="string">
              <text:p text:style-name="Table_20_Heading">權限</text:p>
            </table:table-cell>
            <table:table-cell table:style-name="Table4.A1" office:value-type="string">
              <text:p text:style-name="Table_20_Heading">說明</text:p>
            </table:table-cell>
          </table:table-row>
        </table:table-header-rows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/announcements</text:p>
          </table:table-cell>
          <table:table-cell table:style-name="Table4.A1" office:value-type="string">
            <text:p text:style-name="Table_20_Contents">公開</text:p>
          </table:table-cell>
          <table:table-cell table:style-name="Table4.A1" office:value-type="string">
            <text:p text:style-name="Table_20_Contents">取得所有公告（最新優先）</text:p>
          </table:table-cell>
        </table:table-row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/announcements/{id}</text:p>
          </table:table-cell>
          <table:table-cell table:style-name="Table4.A1" office:value-type="string">
            <text:p text:style-name="Table_20_Contents">公開</text:p>
          </table:table-cell>
          <table:table-cell table:style-name="Table4.A1" office:value-type="string">
            <text:p text:style-name="Table_20_Contents">取得單一公告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/announcements</text:p>
          </table:table-cell>
          <table:table-cell table:style-name="Table4.A1" office:value-type="string">
            <text:p text:style-name="Table_20_Contents">幹部</text:p>
          </table:table-cell>
          <table:table-cell table:style-name="Table4.A1" office:value-type="string">
            <text:p text:style-name="Table_20_Contents">新增公告</text:p>
          </table:table-cell>
        </table:table-row>
        <table:table-row>
          <table:table-cell table:style-name="Table4.A1" office:value-type="string">
            <text:p text:style-name="Table_20_Contents">PATCH</text:p>
          </table:table-cell>
          <table:table-cell table:style-name="Table4.A1" office:value-type="string">
            <text:p text:style-name="Table_20_Contents">/announcements/{id}</text:p>
          </table:table-cell>
          <table:table-cell table:style-name="Table4.A1" office:value-type="string">
            <text:p text:style-name="Table_20_Contents">幹部</text:p>
          </table:table-cell>
          <table:table-cell table:style-name="Table4.A1" office:value-type="string">
            <text:p text:style-name="Table_20_Contents">編輯公告</text:p>
          </table:table-cell>
        </table:table-row>
        <table:table-row>
          <table:table-cell table:style-name="Table4.A1" office:value-type="string">
            <text:p text:style-name="Table_20_Contents">DELETE</text:p>
          </table:table-cell>
          <table:table-cell table:style-name="Table4.A1" office:value-type="string">
            <text:p text:style-name="Table_20_Contents">/announcements/{id}</text:p>
          </table:table-cell>
          <table:table-cell table:style-name="Table4.A1" office:value-type="string">
            <text:p text:style-name="Table_20_Contents">幹部</text:p>
          </table:table-cell>
          <table:table-cell table:style-name="Table4.A1" office:value-type="string">
            <text:p text:style-name="Table_20_Contents">刪除公告</text:p>
          </table:table-cell>
        </table:table-row>
      </table:table>
      <text:p text:style-name="P40"><text:span text:style-name="T14">4. </text:span>歌曲提議（Song Proposals）</text:p>
      <table:table table:name="Table5" table:style-name="Table5">
        <table:table-column table:style-name="Table5.A" table:number-columns-repeated="4"/>
        <table:table-header-rows>
          <table:table-row>
            <table:table-cell table:style-name="Table5.A1" office:value-type="string">
              <text:p text:style-name="Table_20_Heading">HTTP 方法</text:p>
            </table:table-cell>
            <table:table-cell table:style-name="Table5.A1" office:value-type="string">
              <text:p text:style-name="Table_20_Heading">路徑</text:p>
            </table:table-cell>
            <table:table-cell table:style-name="Table5.A1" office:value-type="string">
              <text:p text:style-name="Table_20_Heading">權限</text:p>
            </table:table-cell>
            <table:table-cell table:style-name="Table5.A1" office:value-type="string">
              <text:p text:style-name="Table_20_Heading">說明</text:p>
            </table:table-cell>
          </table:table-row>
        </table:table-header-rows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/song-proposals</text:p>
          </table:table-cell>
          <table:table-cell table:style-name="Table5.A1" office:value-type="string">
            <text:p text:style-name="Table_20_Contents">需登入</text:p>
          </table:table-cell>
          <table:table-cell table:style-name="Table5.A1" office:value-type="string">
            <text:p text:style-name="Table_20_Contents">列出歌曲提議（社員僅見自己的，幹部看見全部）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/song-proposals/{id}</text:p>
          </table:table-cell>
          <table:table-cell table:style-name="Table5.A1" office:value-type="string">
            <text:p text:style-name="Table_20_Contents">需登入</text:p>
          </table:table-cell>
          <table:table-cell table:style-name="Table5.A1" office:value-type="string">
            <text:p text:style-name="Table_20_Contents">取得單一提議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/song-proposals</text:p>
          </table:table-cell>
          <table:table-cell table:style-name="Table5.A1" office:value-type="string">
            <text:p text:style-name="Table_20_Contents">需登入</text:p>
          </table:table-cell>
          <table:table-cell table:style-name="Table5.A1" office:value-type="string">
            <text:p text:style-name="Table_20_Contents">新增歌曲提議</text:p>
          </table:table-cell>
        </table:table-row>
        <text:soft-page-break/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/song-proposals/{id}/join</text:p>
          </table:table-cell>
          <table:table-cell table:style-name="Table5.A1" office:value-type="string">
            <text:p text:style-name="Table_20_Contents">需登入</text:p>
          </table:table-cell>
          <table:table-cell table:style-name="Table5.A1" office:value-type="string">
            <text:p text:style-name="Table_20_Contents">加入歌曲提議並登記樂器</text:p>
          </table:table-cell>
        </table:table-row>
      </table:table>
      <text:p text:style-name="P40"><text:span text:style-name="T14">5. </text:span>練團室預約（Bookings）</text:p>
      <table:table table:name="Table6" table:style-name="Table6">
        <table:table-column table:style-name="Table6.A" table:number-columns-repeated="3"/>
        <table:table-column table:style-name="Table6.D"/>
        <table:table-header-rows>
          <table:table-row>
            <table:table-cell table:style-name="Table6.A1" office:value-type="string">
              <text:p text:style-name="Table_20_Heading">HTTP 方法</text:p>
            </table:table-cell>
            <table:table-cell table:style-name="Table6.A1" office:value-type="string">
              <text:p text:style-name="Table_20_Heading">路徑</text:p>
            </table:table-cell>
            <table:table-cell table:style-name="Table6.A1" office:value-type="string">
              <text:p text:style-name="Table_20_Heading">權限</text:p>
            </table:table-cell>
            <table:table-cell table:style-name="Table6.A1" office:value-type="string">
              <text:p text:style-name="Table_20_Heading">說明</text:p>
            </table:table-cell>
          </table:table-row>
        </table:table-header-rows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/bookings</text:p>
          </table:table-cell>
          <table:table-cell table:style-name="Table6.A1" office:value-type="string">
            <text:p text:style-name="Table_20_Contents">需登入</text:p>
          </table:table-cell>
          <table:table-cell table:style-name="Table6.A1" office:value-type="string">
            <text:p text:style-name="Table_20_Contents">列出所有預約</text:p>
          </table:table-cell>
        </table:table-row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/bookings/{id}</text:p>
          </table:table-cell>
          <table:table-cell table:style-name="Table6.A1" office:value-type="string">
            <text:p text:style-name="Table_20_Contents">需登入</text:p>
          </table:table-cell>
          <table:table-cell table:style-name="Table6.A1" office:value-type="string">
            <text:p text:style-name="Table_20_Contents">取得單一預約</text:p>
          </table:table-cell>
        </table:table-row>
        <table:table-row>
          <table:table-cell table:style-name="Table6.A1" office:value-type="string">
            <text:p text:style-name="Table_20_Contents">POST</text:p>
          </table:table-cell>
          <table:table-cell table:style-name="Table6.A1" office:value-type="string">
            <text:p text:style-name="Table_20_Contents">/bookings</text:p>
          </table:table-cell>
          <table:table-cell table:style-name="Table6.A1" office:value-type="string">
            <text:p text:style-name="Table_20_Contents">需登入</text:p>
          </table:table-cell>
          <table:table-cell table:style-name="Table6.A1" office:value-type="string">
            <text:p text:style-name="Table_20_Contents">新增預約（僅限自己的歌曲，最長 3 小時）</text:p>
          </table:table-cell>
        </table:table-row>
        <table:table-row>
          <table:table-cell table:style-name="Table6.A1" office:value-type="string">
            <text:p text:style-name="Table_20_Contents">PATCH</text:p>
          </table:table-cell>
          <table:table-cell table:style-name="Table6.A1" office:value-type="string">
            <text:p text:style-name="Table_20_Contents">/bookings/{id}/cancel</text:p>
          </table:table-cell>
          <table:table-cell table:style-name="Table6.A1" office:value-type="string">
            <text:p text:style-name="Table_20_Contents">需登入</text:p>
          </table:table-cell>
          <table:table-cell table:style-name="Table6.A1" office:value-type="string">
            <text:p text:style-name="Table_20_Contents">取消預約（發起人或幹部）</text:p>
          </table:table-cell>
        </table:table-row>
      </table:table>
      <text:h text:style-name="Heading_20_3" text:outline-level="3"><text:bookmark-start text:name="網頁規格"/>3.2 網頁規格<text:bookmark-end text:name="網頁規格"/></text:h>
      <text:p text:style-name="First_20_paragraph">本系統前端採用<text:span text:style-name="T15">SPA</text:span>架構，由 FastAPI 直接伺服靜態檔案，無需額外網頁伺服器。</text:p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Table_20_Heading">頁面</text:p>
            </table:table-cell>
            <table:table-cell table:style-name="Table7.A1" office:value-type="string">
              <text:p text:style-name="Table_20_Heading">功能說明</text:p>
            </table:table-cell>
            <table:table-cell table:style-name="Table7.A1" office:value-type="string">
              <text:p text:style-name="Table_20_Heading">權限</text:p>
            </table:table-cell>
          </table:table-row>
        </table:table-header-rows>
        <table:table-row>
          <table:table-cell table:style-name="Table7.A1" office:value-type="string">
            <text:p text:style-name="Table_20_Contents">公告頁（Announcements）</text:p>
          </table:table-cell>
          <table:table-cell table:style-name="Table7.A1" office:value-type="string">
            <text:p text:style-name="Table_20_Contents">顯示所有社團公告；幹部可新增、編輯、刪除</text:p>
          </table:table-cell>
          <table:table-cell table:style-name="Table7.A1" office:value-type="string">
            <text:p text:style-name="Table_20_Contents">公開瀏覽，管理需幹部</text:p>
          </table:table-cell>
        </table:table-row>
        <table:table-row>
          <table:table-cell table:style-name="Table7.A1" office:value-type="string">
            <text:p text:style-name="Table_20_Contents">歌曲提議頁（Song Proposals）</text:p>
          </table:table-cell>
          <table:table-cell table:style-name="Table7.A1" office:value-type="string">
            <text:p text:style-name="Table_20_Contents">顯示歌曲提議及成員列表，可新增提議</text:p>
          </table:table-cell>
          <table:table-cell table:style-name="Table7.A1" office:value-type="string">
            <text:p text:style-name="Table_20_Contents">需登入</text:p>
          </table:table-cell>
        </table:table-row>
        <table:table-row>
          <table:table-cell table:style-name="Table7.A1" office:value-type="string">
            <text:p text:style-name="Table_20_Contents">預約頁（Bookings）</text:p>
          </table:table-cell>
          <table:table-cell table:style-name="Table7.A1" office:value-type="string">
            <text:p text:style-name="Table_20_Contents">顯示練團室預約時程，可新增及取消預約</text:p>
          </table:table-cell>
          <table:table-cell table:style-name="Table7.A1" office:value-type="string">
            <text:p text:style-name="Table_20_Contents">需登入</text:p>
          </table:table-cell>
        </table:table-row>
        <table:table-row>
          <table:table-cell table:style-name="Table7.A1" office:value-type="string">
            <text:p text:style-name="Table_20_Contents">社員管理頁（User Management）</text:p>
          </table:table-cell>
          <table:table-cell table:style-name="Table7.A1" office:value-type="string">
            <text:p text:style-name="Table_20_Contents">列出所有社員，可新增及刪除帳號</text:p>
          </table:table-cell>
          <table:table-cell table:style-name="Table7.A1" office:value-type="string">
            <text:p text:style-name="Table_20_Contents">限幹部</text:p>
          </table:table-cell>
        </table:table-row>
      </table:table>
      <text:p text:style-name="P41">此外，系統提供兩個彈出模態框： </text:p>
      <text:p text:style-name="P41"><text:span text:style-name="T16">1. </text:span><text:span text:style-name="T2">登入模態框</text:span>：輸入使用者名稱與密碼進行身分驗證<text:span text:style-name="T1">。</text:span></text:p>
      <text:p text:style-name="P42"><draw:frame draw:style-name="fr1" draw:name="Image2" text:anchor-type="char" svg:x="1.4854in" svg:y="0.1583in" svg:width="3.7043in" svg:height="2.8283in" draw:z-index="1"><draw:image xlink:href="Pictures/10000001000001B40000014DB0CFA35F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1"><text:soft-page-break/><text:span text:style-name="T16">2. </text:span><text:span text:style-name="T2">密碼修改模態框</text:span>：首次登入時強制要求修改密碼（至少 8 字元），確保帳號安全<text:span text:style-name="T1">。</text:span></text:p>
      <text:p text:style-name="P42"><draw:frame draw:style-name="fr1" draw:name="Image3" text:anchor-type="char" svg:x="1.3701in" svg:y="0.2in" svg:width="4.0598in" svg:height="3.1008in" draw:z-index="2"><draw:image xlink:href="Pictures/10000001000001B40000014DC9A036C5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44" text:outline-level="3" text:is-list-header="true">3.3 資料庫設計</text:h>
      <text:p text:style-name="P45">本系統採用關聯式資料庫 PostgreSQL 16 作為資料持久化層。為確保分散式架構下的全局唯一性與安全性，所有資料表之主鍵皆採用 UUID 取代傳統的自增整數，以防止有心人士透過 ID 遍歷推測系統資料量。以下為資料庫的實體關聯圖：</text:p>
      <text:p text:style-name="P46"><draw:frame draw:style-name="fr1" draw:name="Image4" text:anchor-type="char" svg:x="0.7535in" svg:y="0.152in" svg:width="4.9972in" svg:height="3.0217in" draw:z-index="3"><draw:image xlink:href="Pictures/10003F2800006BBA000041263A34D6F6.svg" xlink:type="simple" xlink:show="embed" xlink:actuate="onLoad" draw:mime-type="image/svg+xml"/><draw:image xlink:href="Pictures/100000010000038D000002265308AC27.png" xlink:type="simple" xlink:show="embed" xlink:actuate="onLoad" draw:mime-type="image/png"/></draw:frame></text:p>
      <text:p text:style-name="P46"><text:soft-page-break/>為確保系統在極端併發情境下的資料一致性，本資料庫設計採用了以下關鍵機制：</text:p>
      <text:p text:style-name="P46"><text:span text:style-name="T2">1. 時間範圍型態與排他性</text:span>：bookings 表中的 booking_period 欄位使用了 PostgreSQL 特有的 TSRANGE（Timestamp Range）型態。相較於傳統將「開始時間」與「結束時間」拆分為兩個獨立欄位的作法，TSRANGE 允許系統在資料庫層級直接建立排他約束。也就是當多名使用者同時送出時段重疊的預約請求時，資料庫引擎能在寫入底層即時攔截並報錯，徹底根絕由Race Condition 導致的場地超額預約問題。</text:p>
      <text:p text:style-name="P46"><text:span text:style-name="T2">2. </text:span><text:span text:style-name="T2">Cascading Deletes</text:span>： 在外部鍵的約束設計上，song_members 高度依賴 users 與 song_proposals。當一筆歌曲提案被刪除時，關聯的樂器配置紀錄應自動觸發 ON DELETE CASCADE 一併清除，避免產生Orphan Records，以維持資料完整性。</text:p>
      <text:p text:style-name="P47"/>
      <text:p text:style-name="P48">四、UI 設計圖</text:p>
      <text:p text:style-name="P49">4.1 首頁公告</text:p>
      <text:p text:style-name="P50"><draw:frame draw:style-name="fr1" draw:name="Image5" text:anchor-type="char" svg:x="1.1299in" svg:y="0.0307in" svg:width="4.389in" svg:height="3.2535in" draw:z-index="4"><draw:image xlink:href="Pictures/10000001000008180000060040F3974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>4.<text:span text:style-name="T17">2</text:span> 歌曲提議</text:p>
      <text:p text:style-name="P51"><draw:frame draw:style-name="fr1" draw:name="Image6" text:anchor-type="char" svg:x="1.1193in" svg:y="0.2055in" svg:width="4.3882in" svg:height="3.252in" draw:z-index="5"><draw:image xlink:href="Pictures/100000010000081800000600DD24F4F9.png" xlink:type="simple" xlink:show="embed" xlink:actuate="onLoad" draw:mime-type="image/png"/></draw:frame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2"><text:soft-page-break/>4.3 預約場地</text:p>
      <text:p text:style-name="P52"/>
      <text:p text:style-name="P52"><draw:frame draw:style-name="fr1" draw:name="Image7" text:anchor-type="char" svg:x="1.0752in" svg:y="-0.052in" svg:width="4.7437in" svg:height="3.5161in" draw:z-index="6"><draw:image xlink:href="Pictures/100000010000081800000600BB45C44D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五、分工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53">姓名</text:p>
            </table:table-cell>
            <table:table-cell table:style-name="Table14.B1" office:value-type="string">
              <text:p text:style-name="P53">工作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31">林貞伶</text:p>
          </table:table-cell>
          <table:table-cell table:style-name="Table14.B2" office:value-type="string">
            <text:p text:style-name="P31">前端開發、製作報告</text:p>
          </table:table-cell>
        </table:table-row>
        <table:table-row table:style-name="Table14.1">
          <table:table-cell table:style-name="Table14.A2" office:value-type="string">
            <text:p text:style-name="P31">林煒宸</text:p>
          </table:table-cell>
          <table:table-cell table:style-name="Table14.B2" office:value-type="string">
            <text:p text:style-name="P31">後端開發、製作報告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  <dc:title>網際網路系統設計 期末專案系統需求規格書</dc:title>
    <dc:description/>
    <dc:subject/>
    <meta:keyword/>
    <meta:initial-creator>4113053103 林貞伶 4113053104 林煒宸</meta:initial-creator>
    <meta:creation-date>2026-06-03T10:25:19Z</meta:creation-date>
    <dc:date>2026-06-03T22:53:14.084073410</dc:date>
    <meta:editing-duration>PT1H15S</meta:editing-duration>
    <meta:editing-cycles>6</meta:editing-cycles>
    <meta:document-statistic meta:table-count="14" meta:image-count="7" meta:object-count="0" meta:page-count="16" meta:paragraph-count="313" meta:word-count="4438" meta:character-count="6475" meta:non-whitespace-character-count="6148"/>
    <meta:user-defined meta:name="CJKmainfont">Noto Sans CJK TC</meta:user-defined>
    <meta:user-defined meta:name="date">2026-06-03</meta:user-defined>
    <meta:user-defined meta:name="fontsize">12pt</meta:user-defined>
    <meta:user-defined meta:name="geometry"/>
    <meta:user-defined meta:name="papersize" meta:value-type="string">a4</meta:user-defined>
  </office:meta>
</office:document-meta>
</file>